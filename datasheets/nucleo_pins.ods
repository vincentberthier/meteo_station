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 table:number-columns-spanned="10" table:number-rows-spanned="1">
            <text:p>NUCLEO-H723ZG, NUCLEO-H743ZI2, and NUCLEO-H753ZI pin assignments</text:p>
          </table:table-cell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10" table:number-rows-spanned="1">
            <text:p>Table 18. ZIO connector (CN7) pinout(1)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2S_A_MCK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2C_A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1_S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2S_A_SD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2S_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2C_A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1_S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2S_A_CK</text:p>
          </table:table-cell>
          <table:table-cell office:value-type="string" calcext:value-type="string">
            <text:p>PB13(2)</text:p>
          </table:table-cell>
          <table:table-cell office:value-type="string" calcext:value-type="string">
            <text:p>I2S_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RE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/VREF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2S_A_WS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2S_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2S_B_WS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2S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_A_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2S_B_MCK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_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_A_MIS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2S_B_SD/SPI_B_MOSI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S_3/SPI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_A_MOSI/TIM_E_PWM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/TIM3_CH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2S_B_CK/SPI_B_SCK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2S_3/SPI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PI_A_CS/TIM_B_PWM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SPI1_CS/TIM4_CH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PI_B_NSS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IM_B_PWM2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TIM4_CH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PI_B_MIS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0" table:number-rows-spanned="1">
            <text:p>Table 19. ZIO connector (CN8) pinout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DMMC_D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ORE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 V refer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DMMC_D1/I2S_A_CKIN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/I2S_CK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DMMC_D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 V input/outp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DMMC_D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5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V 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DMMC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DMMC_CMD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inp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0" table:number-rows-spanned="1">
            <text:p>Table 20. ZIO connector (CN9) pinout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C12_IN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USART_B_SCL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USART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P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USART_B_RX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USART_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_INP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USART_B_TX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USART_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P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USART_B_RTS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USART_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2/PB9</text:p>
          </table:table-cell>
          <table:table-cell office:value-type="string" calcext:value-type="string">
            <text:p>ADC123_INP12/I2C1_S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USART_B_CTS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USART_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F10/PB8</text:p>
          </table:table-cell>
          <table:table-cell office:value-type="string" calcext:value-type="string">
            <text:p>ADC3_INP6/I2C1_SC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72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COMP1_IN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AI_A_MCLK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SAI_1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OMP2_IN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SAI_A_FS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SAI_1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I2C_B_SMBA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2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AI_A_SCK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SAI_1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I2C_B_SCL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2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SAI_A_SD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SAI_1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2C_B_SDA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AI_B_S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SAI_1_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SAI_B_SCK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SAI_1_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CAN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SAI_B_MCLK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SAI_1_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CAN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SAI_B_FS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SAI_1_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0" table:number-rows-spanned="1">
            <text:p>Table 21. ZIO connector (CN10) pinout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TM32H7 pin</text:p>
          </table:table-cell>
          <table:table-cell table:style-name="ce3" office:value-type="string" calcext:value-type="string">
            <text:p>MCU 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alog V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alog 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IMER_A_PWM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TIM1_CH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IMER_A_PWM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TIM1_CH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C_A_IN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DC3_INP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C_B_IN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DC3_INP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IMER_A_PWM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TIM1_CH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_C_IN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DC3_INP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QSPI_CS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QSPI1_NC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SART_A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LPUART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QSPI_CLK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QSPI1_CL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USART_A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PUART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TIMER_A_PWM1N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TIM1_CH1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QSPI_BK1_IO3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QSPI1_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TIMER_A_ETR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TIM1_ET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QSPI_BK1_IO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QSPI1_I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QSPI_BK1_IO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QSPI1_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TIMER_A_PWM2N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TIM1_CH2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QSPI_BK1_IO2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QSPI1_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TIMER_A_PWM3N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TIM1_CH3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TIMER_A_BKIN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TIM1_BKIN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IM_C_PWM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IMER_A_BKIN1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TIM1_BKIN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TIM_D_PWM1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TIMER_C_PWM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TIM2_CH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TIM_B_ETR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TIM4_E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TIMER_C_PWM3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0" table:number-rows-spanned="1">
            <text:p>Table 22. Pin assignment of the ST morpho connector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2" table:number-rows-spanned="1">
            <text:p>CN11 odd pins</text:p>
          </table:table-cell>
          <table:covered-table-cell table:style-name="ce3"/>
          <table:table-cell table:style-name="ce3" office:value-type="string" calcext:value-type="string">
            <text:p>CN11 even pins</text:p>
          </table:table-cell>
          <table:table-cell table:style-name="ce3"/>
          <table:table-cell table:style-name="ce3" office:value-type="string" calcext:value-type="string">
            <text:p>CN12 odd pins</text:p>
          </table:table-cell>
          <table:table-cell table:style-name="ce3"/>
          <table:table-cell table:style-name="ce3" office:value-type="string" calcext:value-type="string">
            <text:p>CN12 even pin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Pin nbr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 nbr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 nbr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 nbr</text:p>
          </table:table-cell>
          <table:table-cell table:style-name="ce3" office:value-type="string" calcext:value-type="string">
            <text:p>Pin na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V3_V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V_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T0(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V_USB_STL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F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RE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3(3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(3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V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B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D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D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G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D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F1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D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D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D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D1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F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F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F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F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G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F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F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G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F1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G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G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G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G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G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G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G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G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D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G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G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G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4:21:40.061290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4:07:40.881173879</meta:creation-date>
    <dc:date>2025-11-06T16:08:12.276905560</dc:date>
    <meta:editing-duration>PT1H41M47S</meta:editing-duration>
    <meta:editing-cycles>2</meta:editing-cycles>
    <meta:generator>LibreOffice/25.8.2.2$Linux_X86_64 LibreOffice_project/580$Build-2</meta:generator>
    <meta:document-statistic meta:table-count="1" meta:cell-count="838" meta:object-count="0"/>
  </office:meta>
</office:document-meta>
</file>